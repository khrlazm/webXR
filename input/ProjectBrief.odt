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Text_20_body" style:list-style-name="L2">
      <style:paragraph-properties fo:margin-top="0in" fo:margin-bottom="0in"/>
    </style:style>
    <style:style style:name="P12" style:family="paragraph" style:parent-style-name="Text_20_body" style:list-style-name="L3">
      <style:paragraph-properties fo:margin-top="0in" fo:margin-bottom="0in"/>
    </style:style>
    <style:style style:name="P13" style:family="paragraph" style:parent-style-name="Text_20_body" style:list-style-name="L4">
      <style:paragraph-properties fo:margin-top="0in" fo:margin-bottom="0in"/>
    </style:style>
    <style:style style:name="P14" style:family="paragraph" style:parent-style-name="Text_20_body" style:list-style-name="L5">
      <style:paragraph-properties fo:margin-top="0in" fo:margin-bottom="0in"/>
    </style:style>
    <style:style style:name="P15" style:family="paragraph" style:parent-style-name="Text_20_body" style:list-style-name="L6">
      <style:paragraph-properties fo:margin-top="0in" fo:margin-bottom="0in"/>
    </style:style>
    <style:style style:name="P16" style:family="paragraph" style:parent-style-name="Text_20_body" style:list-style-name="L7">
      <style:paragraph-properties fo:margin-top="0in" fo:margin-bottom="0in"/>
    </style:style>
    <style:style style:name="P17" style:family="paragraph" style:parent-style-name="Text_20_body" style:list-style-name="L8">
      <style:paragraph-properties fo:margin-top="0in" fo:margin-bottom="0in"/>
    </style:style>
    <style:style style:name="P18" style:family="paragraph" style:parent-style-name="Text_20_body" style:list-style-name="L9">
      <style:paragraph-properties fo:margin-top="0in" fo:margin-bottom="0in"/>
    </style:style>
    <style:style style:name="P19" style:family="paragraph" style:parent-style-name="Preformatted_20_Text">
      <style:paragraph-properties fo:margin-top="0in" fo:margin-bottom="0.1965in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his structure is actually very well suited to VR. A one-shot scene (no camera cuts) is a natural fit for XR because the player occupies the space like a theatre audience. Think of it as a hybrid of immersive theatre, walking simulator, and interactive drama.</text:p>
      <text:h text:style-name="Heading_20_2" text:outline-level="2">Working Title</text:h>
      <text:p text:style-name="Text_20_body"><text:span text:style-name="Strong_20_Emphasis">The Last Audience</text:span><text:line-break/><text:span text:style-name="Emphasis">A One-Shot XR Interactive Theatre Experience</text:span></text:p>
      <text:p text:style-name="Quotations">"In the court of Melaka, loyalty and justice become indistinguishable."</text:p>
      <text:p text:style-name="Horizontal_20_Line"/>
      <text:h text:style-name="Heading_20_1" text:outline-level="1">High Concept</text:h>
      <text:p text:style-name="Text_20_body">The player is <text:span text:style-name="Strong_20_Emphasis">an unseen court attendant</text:span> inside the Balairong Seri (royal audience hall) during the final confrontation between Hang Tuah and Hang Jebat.</text:p>
      <text:p text:style-name="Text_20_body">The player never becomes either hero.</text:p>
      <text:p text:style-name="Text_20_body">Instead, they witness history while subtly influencing the emotional rhythm of the scene.</text:p>
      <text:p text:style-name="Text_20_body">Runtime</text:p>
      <text:p text:style-name="Text_20_body"><text:span text:style-name="Strong_20_Emphasis">10–15 minutes</text:span></text:p>
      <text:p text:style-name="Text_20_body">No loading.</text:p>
      <text:p text:style-name="Text_20_body">No scene transitions.</text:p>
      <text:p text:style-name="Text_20_body">Everything occurs inside one palace hall.</text:p>
      <text:p text:style-name="Horizontal_20_Line"/>
      <text:h text:style-name="Heading_20_1" text:outline-level="1">Core Loop</text:h>
      <text:section text:style-name="Sect1" text:name="code-block-viewer">
        <text:p text:style-name="Preformatted_20_Text"><text:span text:style-name="Source_20_Text">Narrative</text:span></text:p>
        <text:p text:style-name="Preformatted_20_Text"><text:span text:style-name="Source_20_Text">↓</text:span></text:p>
        <text:p text:style-name="Preformatted_20_Text"/>
        <text:p text:style-name="Preformatted_20_Text"><text:span text:style-name="Source_20_Text">Interactive Observation</text:span></text:p>
        <text:p text:style-name="Preformatted_20_Text"/>
        <text:p text:style-name="Preformatted_20_Text"><text:span text:style-name="Source_20_Text">↓</text:span></text:p>
        <text:p text:style-name="Preformatted_20_Text"/>
        <text:p text:style-name="Preformatted_20_Text"><text:span text:style-name="Source_20_Text">Narrative</text:span></text:p>
        <text:p text:style-name="Preformatted_20_Text"/>
        <text:p text:style-name="Preformatted_20_Text"><text:span text:style-name="Source_20_Text">↓</text:span></text:p>
        <text:p text:style-name="Preformatted_20_Text"/>
        <text:p text:style-name="Preformatted_20_Text"><text:span text:style-name="Source_20_Text">Interactive Decision</text:span></text:p>
        <text:p text:style-name="Preformatted_20_Text"/>
        <text:p text:style-name="Preformatted_20_Text"><text:span text:style-name="Source_20_Text">↓</text:span></text:p>
        <text:p text:style-name="Preformatted_20_Text"/>
        <text:p text:style-name="P19"><text:span text:style-name="Source_20_Text">Narrative Ending</text:span></text:p>
      </text:section>
      <text:p text:style-name="Text_20_body">Exactly</text:p>
      <text:section text:style-name="Sect1" text:name="Section1">
        <text:p text:style-name="Preformatted_20_Text"><text:bookmark text:name="code-block-viewer"/><text:span text:style-name="Source_20_Text">i</text:span></text:p>
        <text:p text:style-name="Preformatted_20_Text"><text:span text:style-name="Source_20_Text">↓</text:span></text:p>
        <text:p text:style-name="Preformatted_20_Text"/>
        <text:p text:style-name="Preformatted_20_Text"><text:span text:style-name="Source_20_Text">A</text:span></text:p>
        <text:p text:style-name="Preformatted_20_Text"/>
        <text:p text:style-name="Preformatted_20_Text"><text:soft-page-break/><text:span text:style-name="Source_20_Text">↓</text:span></text:p>
        <text:p text:style-name="Preformatted_20_Text"/>
        <text:p text:style-name="Preformatted_20_Text"><text:span text:style-name="Source_20_Text">ii</text:span></text:p>
        <text:p text:style-name="Preformatted_20_Text"/>
        <text:p text:style-name="Preformatted_20_Text"><text:span text:style-name="Source_20_Text">↓</text:span></text:p>
        <text:p text:style-name="Preformatted_20_Text"/>
        <text:p text:style-name="Preformatted_20_Text"><text:span text:style-name="Source_20_Text">B</text:span></text:p>
        <text:p text:style-name="Preformatted_20_Text"/>
        <text:p text:style-name="Preformatted_20_Text"><text:span text:style-name="Source_20_Text">↓</text:span></text:p>
        <text:p text:style-name="Preformatted_20_Text"/>
        <text:p text:style-name="P19"><text:span text:style-name="Source_20_Text">iii</text:span></text:p>
      </text:section>
      <text:p text:style-name="Horizontal_20_Line"/>
      <text:h text:style-name="Heading_20_1" text:outline-level="1">Palace Layout</text:h>
      <text:section text:style-name="Sect1" text:name="Section2">
        <text:p text:style-name="Preformatted_20_Text"><text:bookmark text:name="code-block-viewer1"/><text:span text:style-name="Source_20_Text"><text:s text:c="16"/>THRONE</text:span></text:p>
        <text:p text:style-name="Preformatted_20_Text"/>
        <text:p text:style-name="Preformatted_20_Text"><text:span text:style-name="Source_20_Text"><text:s text:c="10"/>Sultan (hidden)</text:span></text:p>
        <text:p text:style-name="Preformatted_20_Text"/>
        <text:p text:style-name="Preformatted_20_Text"><text:span text:style-name="Source_20_Text"><text:s text:c="9"/>Palace Curtain</text:span></text:p>
        <text:p text:style-name="Preformatted_20_Text"/>
        <text:p text:style-name="Preformatted_20_Text"><text:span text:style-name="Source_20_Text">────────────────────────</text:span></text:p>
        <text:p text:style-name="Preformatted_20_Text"/>
        <text:p text:style-name="Preformatted_20_Text"><text:span text:style-name="Source_20_Text"><text:s text:c="6"/>Hang Jebat</text:span></text:p>
        <text:p text:style-name="Preformatted_20_Text"/>
        <text:p text:style-name="Preformatted_20_Text"><text:span text:style-name="Source_20_Text"><text:s text:c="11"/>X</text:span></text:p>
        <text:p text:style-name="Preformatted_20_Text"/>
        <text:p text:style-name="Preformatted_20_Text"><text:span text:style-name="Source_20_Text"><text:s text:c="17"/>Player</text:span></text:p>
        <text:p text:style-name="Preformatted_20_Text"/>
        <text:p text:style-name="Preformatted_20_Text"><text:span text:style-name="Source_20_Text"><text:s text:c="21"/>X</text:span></text:p>
        <text:p text:style-name="Preformatted_20_Text"/>
        <text:p text:style-name="Preformatted_20_Text"><text:span text:style-name="Source_20_Text"><text:s text:c="6"/>Ministers</text:span></text:p>
        <text:p text:style-name="Preformatted_20_Text"/>
        <text:p text:style-name="Preformatted_20_Text"><text:span text:style-name="Source_20_Text"><text:s/>Guards <text:s text:c="8"/>Guards</text:span></text:p>
        <text:p text:style-name="Preformatted_20_Text"/>
        <text:p text:style-name="Preformatted_20_Text"><text:span text:style-name="Source_20_Text">────────────────────────</text:span></text:p>
        <text:p text:style-name="Preformatted_20_Text"/>
        <text:p text:style-name="Preformatted_20_Text"><text:span text:style-name="Source_20_Text"><text:s/>Palace Entrance</text:span></text:p>
        <text:p text:style-name="Preformatted_20_Text"/>
        <text:p text:style-name="P19"><text:span text:style-name="Source_20_Text"><text:s text:c="7"/>Hang Tuah</text:span></text:p>
      </text:section>
      <text:p text:style-name="Text_20_body">Entire experience uses one continuous take.</text:p>
      <text:p text:style-name="Text_20_body">No cuts.</text:p>
      <text:p text:style-name="Text_20_body">No teleport.</text:p>
      <text:p text:style-name="Text_20_body">Player may freely move around a limited palace space.</text:p>
      <text:p text:style-name="Horizontal_20_Line"/>
      <text:h text:style-name="Heading_20_1" text:outline-level="1">Scene i</text:h>
      <text:h text:style-name="Heading_20_2" text:outline-level="2">"The Return"</text:h>
      <text:p text:style-name="Text_20_body">Length</text:p>
      <text:p text:style-name="Text_20_body">3 minutes</text:p>
      <text:p text:style-name="Text_20_body"><text:soft-page-break/>Player enters palace.</text:p>
      <text:p text:style-name="Text_20_body">Court is silent.</text:p>
      <text:p text:style-name="Text_20_body">Everyone avoids eye contact.</text:p>
      <text:p text:style-name="Text_20_body">Rain outside.</text:p>
      <text:p text:style-name="Text_20_body">Torchlight flickers.</text:p>
      <text:p text:style-name="Text_20_body">Ambient audio</text:p>
      <text:list xml:id="list7028595705929231637" text:style-name="L1">
        <text:list-item>
          <text:p text:style-name="P10">distant thunder </text:p>
        </text:list-item>
        <text:list-item>
          <text:p text:style-name="P10">dripping rain </text:p>
        </text:list-item>
        <text:list-item>
          <text:p text:style-name="P10">insects </text:p>
        </text:list-item>
        <text:list-item>
          <text:p text:style-name="P1">palace wood creaks </text:p>
        </text:list-item>
      </text:list>
      <text:p text:style-name="Horizontal_20_Line"/>
      <text:h text:style-name="Heading_20_3" text:outline-level="3">Dialogue</text:h>
      <text:p text:style-name="Text_20_body">Minister</text:p>
      <text:p text:style-name="Quotations">Hang Tuah has returned.</text:p>
      <text:p text:style-name="Text_20_body">Another minister</text:p>
      <text:p text:style-name="Quotations">We thought him dead.</text:p>
      <text:p text:style-name="Text_20_body">Jebat laughs.</text:p>
      <text:p text:style-name="Quotations">Dead?</text:p>
      <text:p text:style-name="Quotations">Loyalty buries men before swords do.</text:p>
      <text:p text:style-name="Text_20_body">Silence.</text:p>
      <text:p text:style-name="Text_20_body">Palace doors open.</text:p>
      <text:p text:style-name="Text_20_body">Hang Tuah enters.</text:p>
      <text:p text:style-name="Text_20_body">Very slow walk.</text:p>
      <text:p text:style-name="Text_20_body">No music.</text:p>
      <text:p text:style-name="Text_20_body">Only footsteps.</text:p>
      <text:p text:style-name="Horizontal_20_Line"/>
      <text:p text:style-name="Text_20_body">Tuah</text:p>
      <text:p text:style-name="Quotations">Jebat.</text:p>
      <text:p text:style-name="Text_20_body">Jebat</text:p>
      <text:p text:style-name="Quotations">Brother.</text:p>
      <text:p text:style-name="Text_20_body">Fade naturally into gameplay.</text:p>
      <text:p text:style-name="Horizontal_20_Line"/>
      <text:h text:style-name="Heading_20_1" text:outline-level="1"><text:soft-page-break/>Gameplay A</text:h>
      <text:h text:style-name="Heading_20_2" text:outline-level="2">Observe the Palace</text:h>
      <text:p text:style-name="Text_20_body">Duration</text:p>
      <text:p text:style-name="Text_20_body">2–3 minutes</text:p>
      <text:p text:style-name="Text_20_body">Player explores.</text:p>
      <text:p text:style-name="Text_20_body">Interactive hotspots.</text:p>
      <text:p text:style-name="Horizontal_20_Line"/>
      <text:h text:style-name="Heading_20_3" text:outline-level="3">Examine Tuah's Kris</text:h>
      <text:p text:style-name="Text_20_body">Narration</text:p>
      <text:p text:style-name="Quotations">The weapon of duty.</text:p>
      <text:p text:style-name="Horizontal_20_Line"/>
      <text:h text:style-name="Heading_20_3" text:outline-level="3">Examine Jebat's Kris</text:h>
      <text:p text:style-name="Text_20_body">Narration</text:p>
      <text:p text:style-name="Quotations">The weapon of justice.</text:p>
      <text:p text:style-name="Horizontal_20_Line"/>
      <text:h text:style-name="Heading_20_3" text:outline-level="3">Examine Throne</text:h>
      <text:p text:style-name="Text_20_body">Narration</text:p>
      <text:p text:style-name="Quotations">Empty.</text:p>
      <text:p text:style-name="Text_20_body">Power remains.</text:p>
      <text:p text:style-name="Text_20_body">Authority hides.</text:p>
      <text:p text:style-name="Horizontal_20_Line"/>
      <text:h text:style-name="Heading_20_3" text:outline-level="3">Examine Blood Stains</text:h>
      <text:p text:style-name="Text_20_body">Narration</text:p>
      <text:p text:style-name="Quotations">Yesterday's justice.</text:p>
      <text:p text:style-name="Text_20_body">Today's rebellion.</text:p>
      <text:p text:style-name="Horizontal_20_Line"/>
      <text:h text:style-name="Heading_20_3" text:outline-level="3">Optional conversations</text:h>
      <text:p text:style-name="Text_20_body">Player approaches ministers.</text:p>
      <text:p text:style-name="Text_20_body">Short whispers.</text:p>
      <text:p text:style-name="Quotations"><text:soft-page-break/>We deserve neither man.</text:p>
      <text:p text:style-name="Horizontal_20_Line"/>
      <text:p text:style-name="Text_20_body">When every hotspot has been viewed</text:p>
      <text:p text:style-name="Text_20_body">Dialogue resumes automatically.</text:p>
      <text:p text:style-name="Horizontal_20_Line"/>
      <text:h text:style-name="Heading_20_1" text:outline-level="1">Scene ii</text:h>
      <text:h text:style-name="Heading_20_2" text:outline-level="2">Debate</text:h>
      <text:p text:style-name="Text_20_body">Both warriors circle.</text:p>
      <text:p text:style-name="Text_20_body">No combat yet.</text:p>
      <text:p text:style-name="Text_20_body">The palace becomes a stage.</text:p>
      <text:p text:style-name="Horizontal_20_Line"/>
      <text:p text:style-name="Text_20_body">Jebat</text:p>
      <text:p text:style-name="Quotations">What is loyalty without justice?</text:p>
      <text:p text:style-name="Text_20_body">Tuah</text:p>
      <text:p text:style-name="Quotations">Justice cannot survive without order.</text:p>
      <text:p text:style-name="Text_20_body">Jebat</text:p>
      <text:p text:style-name="Quotations">Order built on fear is no kingdom.</text:p>
      <text:p text:style-name="Text_20_body">Tuah</text:p>
      <text:p text:style-name="Quotations">Then what remains?</text:p>
      <text:p text:style-name="Text_20_body">Jebat</text:p>
      <text:p text:style-name="Quotations">Conscience.</text:p>
      <text:p text:style-name="Text_20_body">Long pause.</text:p>
      <text:p text:style-name="Text_20_body">Wind.</text:p>
      <text:p text:style-name="Text_20_body">Torch extinguishes.</text:p>
      <text:p text:style-name="Horizontal_20_Line"/>
      <text:p text:style-name="Text_20_body">Player hears heartbeat.</text:p>
      <text:p text:style-name="Text_20_body">Music slowly rises.</text:p>
      <text:p text:style-name="Horizontal_20_Line"/>
      <text:h text:style-name="Heading_20_1" text:outline-level="1"><text:soft-page-break/>Gameplay B</text:h>
      <text:h text:style-name="Heading_20_2" text:outline-level="2">The Duel</text:h>
      <text:p text:style-name="Text_20_body">Duration</text:p>
      <text:p text:style-name="Text_20_body">3 minutes</text:p>
      <text:p text:style-name="Text_20_body">Instead of controlling Tuah,</text:p>
      <text:p text:style-name="Text_20_body">Player becomes an invisible stagehand.</text:p>
      <text:p text:style-name="Horizontal_20_Line"/>
      <text:p text:style-name="Text_20_body">Mechanic 1</text:p>
      <text:h text:style-name="Heading_20_3" text:outline-level="3">Strike Rhythm</text:h>
      <text:p text:style-name="Text_20_body">Each sword clash produces glowing timing circles.</text:p>
      <text:p text:style-name="Text_20_body">Player beats ceremonial drums.</text:p>
      <text:p text:style-name="Text_20_body">Correct timing</text:p>
      <text:list xml:id="list2402628427510496516" text:style-name="L2">
        <text:list-item>
          <text:p text:style-name="P11">clash louder </text:p>
        </text:list-item>
        <text:list-item>
          <text:p text:style-name="P11">animation smoother </text:p>
        </text:list-item>
        <text:list-item>
          <text:p text:style-name="P2">emotional intensity rises </text:p>
        </text:list-item>
      </text:list>
      <text:p text:style-name="Text_20_body">Poor timing</text:p>
      <text:list xml:id="list5548234373885676572" text:style-name="L3">
        <text:list-item>
          <text:p text:style-name="P12">slower duel </text:p>
        </text:list-item>
        <text:list-item>
          <text:p text:style-name="P3">awkward pauses </text:p>
        </text:list-item>
      </text:list>
      <text:p text:style-name="Horizontal_20_Line"/>
      <text:p text:style-name="Text_20_body">Mechanic 2</text:p>
      <text:p text:style-name="Text_20_body">Lighting</text:p>
      <text:p text:style-name="Text_20_body">Player can relight extinguished palace torches.</text:p>
      <text:p text:style-name="Text_20_body">Darkness changes mood.</text:p>
      <text:p text:style-name="Horizontal_20_Line"/>
      <text:p text:style-name="Text_20_body">Mechanic 3</text:p>
      <text:p text:style-name="Text_20_body">Gamelan</text:p>
      <text:p text:style-name="Text_20_body">Player rings hanging bronze instruments.</text:p>
      <text:p text:style-name="Text_20_body">Music dynamically follows combat.</text:p>
      <text:p text:style-name="Horizontal_20_Line"/>
      <text:p text:style-name="Text_20_body">Mechanic 4</text:p>
      <text:p text:style-name="Text_20_body">Court Reaction</text:p>
      <text:p text:style-name="Text_20_body">Player looks at ministers.</text:p>
      <text:p text:style-name="Text_20_body">Their fear spreads.</text:p>
      <text:p text:style-name="Text_20_body">Audio changes.</text:p>
      <text:p text:style-name="Text_20_body"><text:soft-page-break/>Breathing.</text:p>
      <text:p text:style-name="Text_20_body">Whispers.</text:p>
      <text:p text:style-name="Horizontal_20_Line"/>
      <text:p text:style-name="Text_20_body">None of these alter history.</text:p>
      <text:p text:style-name="Text_20_body">Only presentation.</text:p>
      <text:p text:style-name="Text_20_body">Like a theatre lighting operator.</text:p>
      <text:p text:style-name="Horizontal_20_Line"/>
      <text:h text:style-name="Heading_20_1" text:outline-level="1">Scene iii</text:h>
      <text:p text:style-name="Text_20_body">Combat ends.</text:p>
      <text:p text:style-name="Text_20_body">Jebat falls.</text:p>
      <text:p text:style-name="Text_20_body">Silence.</text:p>
      <text:p text:style-name="Text_20_body">Rain.</text:p>
      <text:p text:style-name="Horizontal_20_Line"/>
      <text:p text:style-name="Text_20_body">Tuah kneels.</text:p>
      <text:p text:style-name="Text_20_body">No triumph.</text:p>
      <text:p text:style-name="Horizontal_20_Line"/>
      <text:p text:style-name="Text_20_body">Jebat</text:p>
      <text:p text:style-name="Quotations">Tell me...</text:p>
      <text:p text:style-name="Quotations">Did I betray the Sultan...</text:p>
      <text:p text:style-name="Text_20_body">or save his kingdom?</text:p>
      <text:p text:style-name="Text_20_body">Silence.</text:p>
      <text:p text:style-name="Text_20_body">Tuah cannot answer.</text:p>
      <text:p text:style-name="Horizontal_20_Line"/>
      <text:p text:style-name="Text_20_body">Jebat dies.</text:p>
      <text:p text:style-name="Horizontal_20_Line"/>
      <text:p text:style-name="Text_20_body">The palace slowly empties.</text:p>
      <text:p text:style-name="Text_20_body">Only player remains.</text:p>
      <text:p text:style-name="Text_20_body">Rain continues.</text:p>
      <text:p text:style-name="Text_20_body">A servant wipes blood from the floor.</text:p>
      <text:p text:style-name="Horizontal_20_Line"/>
      <text:p text:style-name="Text_20_body">Final narration</text:p>
      <text:p text:style-name="Quotations">Kingdoms remember victories.</text:p>
      <text:p text:style-name="Text_20_body">People remember grief.</text:p>
      <text:p text:style-name="Horizontal_20_Line"/>
      <text:p text:style-name="Text_20_body"><text:soft-page-break/>Fade to black.</text:p>
      <text:p text:style-name="Horizontal_20_Line"/>
      <text:h text:style-name="Heading_20_1" text:outline-level="1">Visual Style</text:h>
      <text:p text:style-name="Text_20_body">Inspired by</text:p>
      <text:list xml:id="list437862914808325766" text:style-name="L4">
        <text:list-item>
          <text:p text:style-name="P13">traditional Malay palace architecture </text:p>
        </text:list-item>
        <text:list-item>
          <text:p text:style-name="P13">candlelit historical drama </text:p>
        </text:list-item>
        <text:list-item>
          <text:p text:style-name="P13">stage theatre blocking </text:p>
        </text:list-item>
        <text:list-item>
          <text:p text:style-name="P4">minimalist environmental storytelling </text:p>
        </text:list-item>
      </text:list>
      <text:p text:style-name="Text_20_body">Lighting should resemble an indoor theatrical production:</text:p>
      <text:list xml:id="list1126815749618050258" text:style-name="L5">
        <text:list-item>
          <text:p text:style-name="P14">warm torchlight </text:p>
        </text:list-item>
        <text:list-item>
          <text:p text:style-name="P14">moonlight through carved windows </text:p>
        </text:list-item>
        <text:list-item>
          <text:p text:style-name="P14">volumetric dust </text:p>
        </text:list-item>
        <text:list-item>
          <text:p text:style-name="P14">soft smoke </text:p>
        </text:list-item>
        <text:list-item>
          <text:p text:style-name="P5">polished timber reflections </text:p>
        </text:list-item>
      </text:list>
      <text:p text:style-name="Horizontal_20_Line"/>
      <text:h text:style-name="Heading_20_1" text:outline-level="1">Interaction Philosophy</text:h>
      <text:p text:style-name="Text_20_body">The player never changes history.</text:p>
      <text:p text:style-name="Text_20_body">Instead, they become part of the performance.</text:p>
      <text:p text:style-name="Text_20_body">Their role is to:</text:p>
      <text:list xml:id="list567340833132405068" text:style-name="L6">
        <text:list-item>
          <text:p text:style-name="P15">witness </text:p>
        </text:list-item>
        <text:list-item>
          <text:p text:style-name="P15">illuminate </text:p>
        </text:list-item>
        <text:list-item>
          <text:p text:style-name="P15">accompany </text:p>
        </text:list-item>
        <text:list-item>
          <text:p text:style-name="P6">amplify </text:p>
        </text:list-item>
      </text:list>
      <text:p text:style-name="Text_20_body">This mirrors the role of a theatre stage crew or a <text:span text:style-name="Emphasis">wayang kulit</text:span> audience, where participation shapes the experience without rewriting the story.</text:p>
      <text:p text:style-name="Horizontal_20_Line"/>
      <text:h text:style-name="Heading_20_1" text:outline-level="1">Three.js XR Technical Scope</text:h>
      <text:p text:style-name="Text_20_body">This concept is intentionally achievable as a compact vertical slice using modern WebXR.</text:p>
      <text:p text:style-name="Text_20_body"><text:span text:style-name="Strong_20_Emphasis">Environment</text:span></text:p>
      <text:list xml:id="list2040200894078069658" text:style-name="L7">
        <text:list-item>
          <text:p text:style-name="P16">Single palace interior with baked global illumination and dynamic torch lights. </text:p>
        </text:list-item>
        <text:list-item>
          <text:p text:style-name="P7">One continuous scene graph (no loading transitions). </text:p>
        </text:list-item>
      </text:list>
      <text:p text:style-name="Text_20_body"><text:span text:style-name="Strong_20_Emphasis">Characters</text:span></text:p>
      <text:list xml:id="list2675289921400406659" text:style-name="L8">
        <text:list-item>
          <text:p text:style-name="P17">Two animated skeletal characters (Hang Tuah and Hang Jebat). </text:p>
        </text:list-item>
        <text:list-item>
          <text:p text:style-name="P8">Background NPCs (guards and ministers) with idle animation loops. </text:p>
        </text:list-item>
      </text:list>
      <text:p text:style-name="Text_20_body"><text:span text:style-name="Strong_20_Emphasis">Interaction</text:span></text:p>
      <text:list xml:id="list2030871970555395588" text:style-name="L9">
        <text:list-item>
          <text:p text:style-name="P18"><text:soft-page-break/>XR controller raycasting for examining objects. </text:p>
        </text:list-item>
        <text:list-item>
          <text:p text:style-name="P18">Trigger volumes to advance dialogue. </text:p>
        </text:list-item>
        <text:list-item>
          <text:p text:style-name="P18">Rhythm interaction synchronized with sword impacts. </text:p>
        </text:list-item>
        <text:list-item>
          <text:p text:style-name="P18">Torch-light interaction using grab or touch mechanics. </text:p>
        </text:list-item>
        <text:list-item>
          <text:p text:style-name="P9">Spatial audio for dialogue, rain, thunder, and percussion. </text:p>
        </text:list-item>
      </text:list>
      <text:p text:style-name="Text_20_body"><text:span text:style-name="Strong_20_Emphasis">Timeline Structure</text:span></text:p>
      <text:section text:style-name="Sect1" text:name="Section3">
        <text:p text:style-name="Preformatted_20_Text"><text:bookmark text:name="code-block-viewer2"/><text:span text:style-name="Source_20_Text">Scene i</text:span></text:p>
        <text:p text:style-name="Preformatted_20_Text"><text:span text:style-name="Source_20_Text"><text:s text:c="2"/>↓</text:span></text:p>
        <text:p text:style-name="Preformatted_20_Text"><text:span text:style-name="Source_20_Text">Dialogue Timeline</text:span></text:p>
        <text:p text:style-name="Preformatted_20_Text"><text:span text:style-name="Source_20_Text"><text:s text:c="2"/>↓</text:span></text:p>
        <text:p text:style-name="Preformatted_20_Text"><text:span text:style-name="Source_20_Text">Gameplay A</text:span></text:p>
        <text:p text:style-name="Preformatted_20_Text"><text:span text:style-name="Source_20_Text"><text:s text:c="2"/>↓</text:span></text:p>
        <text:p text:style-name="Preformatted_20_Text"><text:span text:style-name="Source_20_Text">Dialogue Timeline</text:span></text:p>
        <text:p text:style-name="Preformatted_20_Text"><text:span text:style-name="Source_20_Text"><text:s text:c="2"/>↓</text:span></text:p>
        <text:p text:style-name="Preformatted_20_Text"><text:span text:style-name="Source_20_Text">Gameplay B</text:span></text:p>
        <text:p text:style-name="Preformatted_20_Text"><text:span text:style-name="Source_20_Text"><text:s text:c="2"/>↓</text:span></text:p>
        <text:p text:style-name="P19"><text:span text:style-name="Source_20_Text">Final Timeline</text:span></text:p>
      </text:section>
      <text:p text:style-name="Text_20_body">Everything unfolds in a single uninterrupted take, emphasizing presence and theatricality. Rather than treating the Hang Tuah–Hang Jebat duel as an action game, this design frames it as a living stage performance where the player acts as the unseen witness whose attention, rhythm, and interaction shape the emotional experience without altering the historical outcom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MY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MY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7-19T17:02:58.82</meta:creation-date>
    <meta:document-statistic meta:table-count="0" meta:image-count="0" meta:object-count="0" meta:page-count="9" meta:paragraph-count="236" meta:word-count="806" meta:character-count="5310"/>
    <dc:date>2026-07-19T17:03:18.76</dc:date>
    <meta:editing-duration>PT21S</meta:editing-duration>
    <meta:editing-cycles>1</meta:editing-cycles>
    <meta:generator>OpenOffice/4.1.15$Win32 OpenOffice.org_project/4115m2$Build-9813</meta:generator>
  </office:meta>
</office:document-meta>
</file>