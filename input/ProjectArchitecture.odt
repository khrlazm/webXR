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292in"/>
    </style:style>
    <style:style style:name="Table1.B" style:family="table-column">
      <style:table-column-properties style:column-width="1.0326in"/>
    </style:style>
    <style:style style:name="Table1.C" style:family="table-column">
      <style:table-column-properties style:column-width="1.9979in"/>
    </style:style>
    <style:style style:name="Table1.D" style:family="table-column">
      <style:table-column-properties style:column-width="2.53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.0835in" fo:line-height="114%"/>
      <style:text-properties style:font-name="Google Sans Text"/>
    </style:style>
    <style:style style:name="P2" style:family="paragraph" style:parent-style-name="Text_20_body" style:list-style-name="L2">
      <style:paragraph-properties fo:margin-top="0in" fo:margin-bottom="0.0835in" fo:line-height="114%"/>
      <style:text-properties style:font-name="Google Sans Text"/>
    </style:style>
    <style:style style:name="P3" style:family="paragraph" style:parent-style-name="Text_20_body" style:list-style-name="L3">
      <style:paragraph-properties fo:margin-top="0in" fo:margin-bottom="0.0835in" fo:line-height="114%"/>
      <style:text-properties style:font-name="Google Sans Text"/>
    </style:style>
    <style:style style:name="P4" style:family="paragraph" style:parent-style-name="Text_20_body" style:list-style-name="L5">
      <style:paragraph-properties fo:margin-top="0in" fo:margin-bottom="0.0835in" fo:line-height="114%"/>
      <style:text-properties style:font-name="Google Sans Text"/>
    </style:style>
    <style:style style:name="P5" style:family="paragraph" style:parent-style-name="Text_20_body" style:list-style-name="L6">
      <style:paragraph-properties fo:margin-top="0in" fo:margin-bottom="0.0835in" fo:line-height="114%"/>
      <style:text-properties style:font-name="Google Sans Text"/>
    </style:style>
    <style:style style:name="P6" style:family="paragraph" style:parent-style-name="Text_20_body" style:list-style-name="L7">
      <style:paragraph-properties fo:margin-top="0in" fo:margin-bottom="0.0835in" fo:line-height="114%"/>
      <style:text-properties style:font-name="Google Sans Text"/>
    </style:style>
    <style:style style:name="P7" style:family="paragraph" style:parent-style-name="Text_20_body" style:list-style-name="L8">
      <style:paragraph-properties fo:margin-top="0in" fo:margin-bottom="0.0835in" fo:line-height="114%"/>
      <style:text-properties style:font-name="Google Sans Text"/>
    </style:style>
    <style:style style:name="P8" style:family="paragraph" style:parent-style-name="Text_20_body" style:list-style-name="L9">
      <style:paragraph-properties fo:margin-top="0in" fo:margin-bottom="0.0835in" fo:line-height="114%"/>
      <style:text-properties style:font-name="Google Sans Text"/>
    </style:style>
    <style:style style:name="P9" style:family="paragraph" style:parent-style-name="Text_20_body" style:list-style-name="L2">
      <style:paragraph-properties fo:margin-top="0in" fo:margin-bottom="0.0835in" fo:line-height="114%"/>
      <style:text-properties style:font-name="Google Sans Text" fo:font-weight="bold"/>
    </style:style>
    <style:style style:name="P10" style:family="paragraph" style:parent-style-name="Text_20_body" style:list-style-name="L3">
      <style:paragraph-properties fo:margin-top="0in" fo:margin-bottom="0.0835in" fo:line-height="114%"/>
      <style:text-properties style:font-name="Google Sans Text" fo:font-weight="bold"/>
    </style:style>
    <style:style style:name="P11" style:family="paragraph" style:parent-style-name="Text_20_body" style:list-style-name="L5">
      <style:paragraph-properties fo:margin-top="0in" fo:margin-bottom="0.0835in" fo:line-height="114%"/>
      <style:text-properties style:font-name="Google Sans Text" fo:font-weight="bold"/>
    </style:style>
    <style:style style:name="P12" style:family="paragraph" style:parent-style-name="Text_20_body" style:list-style-name="L6">
      <style:paragraph-properties fo:margin-top="0in" fo:margin-bottom="0.0835in" fo:line-height="114%"/>
      <style:text-properties style:font-name="Google Sans Text" fo:font-weight="bold"/>
    </style:style>
    <style:style style:name="P13" style:family="paragraph" style:parent-style-name="Text_20_body" style:list-style-name="L7">
      <style:paragraph-properties fo:margin-top="0in" fo:margin-bottom="0.0835in" fo:line-height="114%"/>
      <style:text-properties style:font-name="Google Sans Text" fo:font-weight="bold"/>
    </style:style>
    <style:style style:name="P14" style:family="paragraph" style:parent-style-name="Text_20_body">
      <style:paragraph-properties fo:margin-top="0in" fo:margin-bottom="0.0835in" fo:line-height="114%"/>
    </style:style>
    <style:style style:name="P15" style:family="paragraph" style:parent-style-name="Text_20_body" style:list-style-name="L1">
      <style:paragraph-properties fo:margin-top="0in" fo:margin-bottom="0.0835in" fo:line-height="114%"/>
    </style:style>
    <style:style style:name="P16" style:family="paragraph" style:parent-style-name="Text_20_body" style:list-style-name="L2">
      <style:paragraph-properties fo:margin-top="0in" fo:margin-bottom="0.0835in" fo:line-height="114%"/>
    </style:style>
    <style:style style:name="P17" style:family="paragraph" style:parent-style-name="Text_20_body" style:list-style-name="L3">
      <style:paragraph-properties fo:margin-top="0in" fo:margin-bottom="0.0835in" fo:line-height="114%"/>
    </style:style>
    <style:style style:name="P18" style:family="paragraph" style:parent-style-name="Text_20_body" style:list-style-name="L4">
      <style:paragraph-properties fo:margin-top="0in" fo:margin-bottom="0.0835in" fo:line-height="114%"/>
    </style:style>
    <style:style style:name="P19" style:family="paragraph" style:parent-style-name="Text_20_body" style:list-style-name="L5">
      <style:paragraph-properties fo:margin-top="0in" fo:margin-bottom="0.0835in" fo:line-height="114%"/>
    </style:style>
    <style:style style:name="P20" style:family="paragraph" style:parent-style-name="Text_20_body" style:list-style-name="L6">
      <style:paragraph-properties fo:margin-top="0in" fo:margin-bottom="0.0835in" fo:line-height="114%"/>
    </style:style>
    <style:style style:name="P21" style:family="paragraph" style:parent-style-name="Text_20_body" style:list-style-name="L7">
      <style:paragraph-properties fo:margin-top="0in" fo:margin-bottom="0.0835in" fo:line-height="114%"/>
    </style:style>
    <style:style style:name="P22" style:family="paragraph" style:parent-style-name="Text_20_body" style:list-style-name="L8">
      <style:paragraph-properties fo:margin-top="0in" fo:margin-bottom="0.0835in" fo:line-height="114%"/>
    </style:style>
    <style:style style:name="P23" style:family="paragraph" style:parent-style-name="Text_20_body" style:list-style-name="L9">
      <style:paragraph-properties fo:margin-top="0in" fo:margin-bottom="0.0835in" fo:line-height="114%"/>
    </style:style>
    <style:style style:name="P24" style:family="paragraph" style:parent-style-name="Preformatted_20_Text">
      <style:paragraph-properties fo:margin-top="0in" fo:margin-bottom="0in" fo:line-height="114%"/>
    </style:style>
    <style:style style:name="P25" style:family="paragraph" style:parent-style-name="Table_20_Contents">
      <style:paragraph-properties fo:margin-top="0in" fo:margin-bottom="0.0835in" fo:line-height="114%" fo:padding-left="0.1252in" fo:padding-right="0.1252in" fo:padding-top="0.0835in" fo:padding-bottom="0.0835in" fo:border="0.0008in solid #c4c7c5"/>
      <style:text-properties style:font-name="Google Sans Text" fo:font-weight="bold"/>
    </style:style>
    <style:style style:name="P26" style:family="paragraph" style:parent-style-name="Table_20_Contents">
      <style:paragraph-properties fo:margin-top="0in" fo:margin-bottom="0.0835in" fo:line-height="114%" fo:padding-left="0.1252in" fo:padding-right="0.1252in" fo:padding-top="0.0835in" fo:padding-bottom="0.0835in" fo:border="0.0008in solid #c4c7c5"/>
      <style:text-properties style:font-name="Google Sans Text"/>
    </style:style>
    <style:style style:name="P27" style:family="paragraph" style:parent-style-name="Table_20_Contents">
      <style:paragraph-properties fo:margin-top="0in" fo:margin-bottom="0.0835in" fo:line-height="114%" fo:padding-left="0.1252in" fo:padding-right="0.1252in" fo:padding-top="0.0835in" fo:padding-bottom="0.0835in" fo:border="0.0008in solid #c4c7c5"/>
    </style:style>
    <style:style style:name="P28" style:family="paragraph" style:parent-style-name="Table_20_Contents">
      <style:paragraph-properties fo:margin-top="0in" fo:margin-bottom="0in" fo:line-height="114%" fo:padding-left="0.1252in" fo:padding-right="0.1252in" fo:padding-top="0.0835in" fo:padding-bottom="0.0835in" fo:border="0.0008in solid #c4c7c5"/>
    </style:style>
    <style:style style:name="P29" style:family="paragraph" style:parent-style-name="Heading_20_3">
      <style:paragraph-properties fo:margin-top="0in" fo:margin-bottom="0.0835in" fo:line-height="114%"/>
      <style:text-properties style:font-name="Google Sans"/>
    </style:style>
    <style:style style:name="P30" style:family="paragraph" style:parent-style-name="Heading_20_2">
      <style:paragraph-properties fo:margin-top="0in" fo:margin-bottom="0.0835in" fo:line-height="114%"/>
      <style:text-properties style:font-name="Google Sans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a comprehensive, production-ready breakdown of this WebXR blueprint. It is structured specifically for <text:span text:style-name="T1">Claude</text:span> (or any LLM/developer) to ingest and immediately translate into code, assets, and design systems.</text:p>
      <text:h text:style-name="P30" text:outline-level="2">? Project Architecture &amp; Setup</text:h>
      <text:p text:style-name="P24"><text:span text:style-name="Source_20_Text"><text:span text:style-name="T2">[WebXR Manager] ──&gt; [State Machine] ──&gt; [Audio / Dialogue Engine]</text:span></text:span></text:p>
      <text:p text:style-name="P24"><text:span text:style-name="Source_20_Text"><text:s text:c="27"/>│</text:span></text:p>
      <text:p text:style-name="P24"><text:span text:style-name="Source_20_Text"><text:s text:c="7"/>┌───────────────────┴───────────────────┐</text:span></text:p>
      <text:p text:style-name="P24"><text:span text:style-name="Source_20_Text"><text:s text:c="7"/>▼ <text:s text:c="38"/>▼</text:span></text:p>
      <text:p text:style-name="P24"><text:span text:style-name="Source_20_Text"><text:span text:style-name="T2">[Environment &amp; Lighting] <text:s text:c="14"/>[Animation &amp; Timeline]</text:span></text:span></text:p>
      <text:p text:style-name="P24"><text:span text:style-name="Source_20_Text"><text:s/></text:span><text:span text:style-name="Source_20_Text"><text:span text:style-name="T2">- Balairong Seri Baked Mesh <text:s text:c="11"/>- Continuous Three.js Mixer</text:span></text:span></text:p>
      <text:p text:style-name="P24"><text:span text:style-name="Source_20_Text"><text:s/></text:span><text:span text:style-name="Source_20_Text"><text:span text:style-name="T2">- Dynamic Torch Instances <text:s text:c="13"/>- Interaction Hooks</text:span></text:span></text:p>
      <text:h text:style-name="P29" text:outline-level="3">Technical Stack &amp; Dependencies</text:h>
      <text:list xml:id="list8641465386004550712" text:style-name="L1">
        <text:list-item>
          <text:p text:style-name="P15"><text:span text:style-name="T3">Engine:</text:span><text:span text:style-name="T2"> </text:span><text:span text:style-name="Source_20_Text"><text:span text:style-name="T2">three.js</text:span></text:span><text:span text:style-name="T2"> (r150+) using the built-in </text:span><text:span text:style-name="Source_20_Text"><text:span text:style-name="T2">WebGLRenderer</text:span></text:span><text:span text:style-name="T2"> XR loop.</text:span></text:p>
        </text:list-item>
        <text:list-item>
          <text:p text:style-name="P15"><text:span text:style-name="T3">XR Wrapper:</text:span><text:span text:style-name="T2"> </text:span><text:span text:style-name="Source_20_Text"><text:span text:style-name="T2">@react-three/xr</text:span></text:span><text:span text:style-name="T2"> (if using React) or vanilla </text:span><text:span text:style-name="Source_20_Text"><text:span text:style-name="T2">navigator.xr</text:span></text:span><text:span text:style-name="T2"> with </text:span><text:span text:style-name="Source_20_Text"><text:span text:style-name="T2">XRControllerModelFactory</text:span></text:span><text:span text:style-name="T2">.</text:span></text:p>
        </text:list-item>
        <text:list-item>
          <text:p text:style-name="P15"><text:span text:style-name="T3">Animation/Timeline:</text:span><text:span text:style-name="T2"> </text:span><text:span text:style-name="Source_20_Text"><text:span text:style-name="T2">GSAP</text:span></text:span><text:span text:style-name="T2"> (GreenSock) for linear narrative triggers, UI fades, and camera constraints; </text:span><text:span text:style-name="Source_20_Text"><text:span text:style-name="T2">THREE.AnimationMixer</text:span></text:span><text:span text:style-name="T2"> for character skeletal movement.</text:span></text:p>
        </text:list-item>
        <text:list-item>
          <text:p text:style-name="P15"><text:span text:style-name="T3">Audio:</text:span><text:span text:style-name="T2"> </text:span><text:span text:style-name="Source_20_Text"><text:span text:style-name="T2">THREE.AudioListener</text:span></text:span><text:span text:style-name="T2"> and </text:span><text:span text:style-name="Source_20_Text"><text:span text:style-name="T2">THREE.PositionalAudio</text:span></text:span><text:span text:style-name="T2"> for spatialized, 3D environmental soundscapes.</text:span></text:p>
        </text:list-item>
      </text:list>
      <text:h text:style-name="P30" text:outline-level="2">? State Machine &amp; Logic Flow</text:h>
      <text:p text:style-name="P14"><text:span text:style-name="T2">To handle the </text:span><text:span text:style-name="Source_20_Text"><text:span text:style-name="T2">i-A-ii-B-iii</text:span></text:span><text:span text:style-name="T2"> structure in a single scene graph without reloading, implement a centralized game loop state machine:</text:span></text:p>
      <text:p text:style-name="P1">JavaScript</text:p>
      <text:p text:style-name="P24"><text:span text:style-name="Source_20_Text"><text:span text:style-name="T2">const AppState = {</text:span></text:span></text:p>
      <text:p text:style-name="P24"><text:span text:style-name="Source_20_Text"><text:s text:c="2"/></text:span><text:span text:style-name="Source_20_Text"><text:span text:style-name="T2">INTRO_CUTSCENE: 'i', <text:s text:c="5"/>// Scene i: Narrative intro</text:span></text:span></text:p>
      <text:p text:style-name="P24"><text:span text:style-name="Source_20_Text"><text:s text:c="2"/></text:span><text:span text:style-name="Source_20_Text"><text:span text:style-name="T2">PALACE_EXPLORATION: 'A', // Gameplay A: Hotspot interaction</text:span></text:span></text:p>
      <text:p text:style-name="P24"><text:span text:style-name="Source_20_Text"><text:s text:c="2"/></text:span><text:span text:style-name="Source_20_Text"><text:span text:style-name="T2">DEBATE_CUTSCENE: 'ii', <text:s text:c="3"/>// Scene ii: Narrative confrontation</text:span></text:span></text:p>
      <text:p text:style-name="P24"><text:span text:style-name="Source_20_Text"><text:s text:c="2"/></text:span><text:span text:style-name="Source_20_Text"><text:span text:style-name="T2">THE_DUEL: 'B', <text:s text:c="10"/>// Gameplay B: Rhythm &amp; environment control</text:span></text:span></text:p>
      <text:p text:style-name="P24"><text:span text:style-name="Source_20_Text"><text:s text:c="2"/></text:span><text:span text:style-name="Source_20_Text"><text:span text:style-name="T2">OUTRO: 'iii' <text:s text:c="12"/>// Scene iii: Narrative conclusion</text:span></text:span></text:p>
      <text:p text:style-name="P24"><text:span text:style-name="Source_20_Text"><text:span text:style-name="T2">};</text:span></text:span></text:p>
      <text:h text:style-name="P30" text:outline-level="2">? Detailed Scene-by-Scene Breakdown</text:h>
      <text:h text:style-name="P29" text:outline-level="3">Scene i: The Return (Narrative Cutscene)</text:h>
      <text:list xml:id="list633522373081309184" text:style-name="L2">
        <text:list-item>
          <text:p text:style-name="P2"><text:span text:style-name="T1">Goal:</text:span> Establish presence, spatial scale, and dread.</text:p>
        </text:list-item>
        <text:list-item>
          <text:p text:style-name="P9">Three.js Setup:</text:p>
          <text:list>
            <text:list-item>
              <text:p text:style-name="P16"><text:span text:style-name="T2">Lock player position to spawn node </text:span><text:span text:style-name="Source_20_Text"><text:span text:style-name="T2">[0, 1.6, 6]</text:span></text:span><text:span text:style-name="T2">. Disable controller raycaster interactions.</text:span></text:p>
            </text:list-item>
            <text:list-item>
              <text:p text:style-name="P16"><text:span text:style-name="T2">Trigger </text:span><text:span text:style-name="Source_20_Text"><text:span text:style-name="T2">rain_ambient_loop.mp3</text:span></text:span><text:span text:style-name="T2"> and </text:span><text:span text:style-name="Source_20_Text"><text:span text:style-name="T2">thunder_spatial.mp3</text:span></text:span><text:span text:style-name="T2"> at random intervals.</text:span></text:p>
            </text:list-item>
          </text:list>
        </text:list-item>
        <text:list-item>
          <text:p text:style-name="P9">Action Sequence:</text:p>
          <text:list>
            <text:list-item text:start-value="1">
              <text:p text:style-name="P16"><text:span text:style-name="T2">Play pre-baked skeletal animations for </text:span><text:span text:style-name="Source_20_Text"><text:span text:style-name="T2">Ministers</text:span></text:span><text:span text:style-name="T2"> (whispering idles).</text:span></text:p>
            </text:list-item>
            <text:list-item>
              <text:p text:style-name="P2"><text:soft-page-break/>Trigger spatial dialogue audio nodes attached to Minister mesh heads.</text:p>
            </text:list-item>
            <text:list-item>
              <text:p text:style-name="P2">Animate Palace Doors rotating on their Y-axis.</text:p>
            </text:list-item>
            <text:list-item>
              <text:p text:style-name="P16"><text:span text:style-name="T2">Translate </text:span><text:span text:style-name="Source_20_Text"><text:span text:style-name="T2">HangTuah</text:span></text:span><text:span text:style-name="T2"> mesh from </text:span><text:span text:style-name="Source_20_Text"><text:span text:style-name="T2">[0, 0, 12]</text:span></text:span><text:span text:style-name="T2"> to </text:span><text:span text:style-name="Source_20_Text"><text:span text:style-name="T2">[0, 0, 3]</text:span></text:span><text:span text:style-name="T2"> using a slow walking animation cycle.</text:span></text:p>
            </text:list-item>
            <text:list-item>
              <text:p text:style-name="P16"><text:span text:style-name="T2">On completion of the dialogue lines, transition state to </text:span><text:span text:style-name="Source_20_Text"><text:span text:style-name="T2">AppState.PALACE_EXPLORATION</text:span></text:span><text:span text:style-name="T2">.</text:span></text:p>
            </text:list-item>
          </text:list>
        </text:list-item>
      </text:list>
      <text:h text:style-name="P29" text:outline-level="3">Gameplay A: Observe the Palace (Interactive Exploration)</text:h>
      <text:list xml:id="list6873436516490100580" text:style-name="L3">
        <text:list-item>
          <text:p text:style-name="P3"><text:span text:style-name="T1">Goal:</text:span> Build narrative context through environmental storytelling.</text:p>
        </text:list-item>
        <text:list-item>
          <text:p text:style-name="P10">Three.js Setup:</text:p>
          <text:list>
            <text:list-item>
              <text:p text:style-name="P17"><text:span text:style-name="T2">Enable XR Controller raycasters with a visual pointer line (</text:span><text:span text:style-name="Source_20_Text"><text:span text:style-name="T2">THREE.Line</text:span></text:span><text:span text:style-name="T2">).</text:span></text:p>
            </text:list-item>
            <text:list-item>
              <text:p text:style-name="P17"><text:span text:style-name="T2">Activate 4 invisible </text:span><text:span text:style-name="Source_20_Text"><text:span text:style-name="T2">THREE.Mesh</text:span></text:span><text:span text:style-name="T2"> bounding boxes representing interactive hotspots.</text:span></text:p>
            </text:list-item>
          </text:list>
        </text:list-item>
        <text:list-item>
          <text:p text:style-name="P10">Interaction Mechanic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8"><text:span text:style-name="Strong_20_Emphasis"><text:span text:style-name="T2">Hotspot Object</text:span></text:span></text:p>
            </table:table-cell>
            <table:table-cell table:style-name="Table1.A1" office:value-type="string">
              <text:p text:style-name="P28"><text:span text:style-name="Strong_20_Emphasis"><text:span text:style-name="T2">Position</text:span></text:span></text:p>
            </table:table-cell>
            <table:table-cell table:style-name="Table1.A1" office:value-type="string">
              <text:p text:style-name="P28"><text:span text:style-name="Strong_20_Emphasis"><text:span text:style-name="T2">Visual Indicator</text:span></text:span></text:p>
            </table:table-cell>
            <table:table-cell table:style-name="Table1.A1" office:value-type="string">
              <text:p text:style-name="P28"><text:span text:style-name="Strong_20_Emphasis"><text:span text:style-name="T2">Triggered Even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5">Tuah's Kris</text:p>
          </table:table-cell>
          <table:table-cell table:style-name="Table1.A1" office:value-type="string">
            <text:p text:style-name="P27"><text:span text:style-name="Source_20_Text"><text:span text:style-name="T2">[ -1.5, 0.8, 2 ]</text:span></text:span></text:p>
          </table:table-cell>
          <table:table-cell table:style-name="Table1.A1" office:value-type="string">
            <text:p text:style-name="P26">Subtle breathing emissive pulse</text:p>
          </table:table-cell>
          <table:table-cell table:style-name="Table1.A1" office:value-type="string">
            <text:p text:style-name="P26">Spatial voiceover text overlay &amp; audio</text:p>
          </table:table-cell>
        </table:table-row>
        <table:table-row>
          <table:table-cell table:style-name="Table1.A1" office:value-type="string">
            <text:p text:style-name="P25">Jebat's Kris</text:p>
          </table:table-cell>
          <table:table-cell table:style-name="Table1.A1" office:value-type="string">
            <text:p text:style-name="P27"><text:span text:style-name="Source_20_Text"><text:span text:style-name="T2">[ 1.5, 0.8, 2 ]</text:span></text:span></text:p>
          </table:table-cell>
          <table:table-cell table:style-name="Table1.A1" office:value-type="string">
            <text:p text:style-name="P26">Subtle breathing emissive pulse</text:p>
          </table:table-cell>
          <table:table-cell table:style-name="Table1.A1" office:value-type="string">
            <text:p text:style-name="P26">Spatial voiceover text overlay &amp; audio</text:p>
          </table:table-cell>
        </table:table-row>
        <table:table-row>
          <table:table-cell table:style-name="Table1.A1" office:value-type="string">
            <text:p text:style-name="P25">Empty Throne</text:p>
          </table:table-cell>
          <table:table-cell table:style-name="Table1.A1" office:value-type="string">
            <text:p text:style-name="P27"><text:span text:style-name="Source_20_Text"><text:span text:style-name="T2">[ 0, 1.5, -5 ]</text:span></text:span></text:p>
          </table:table-cell>
          <table:table-cell table:style-name="Table1.A1" office:value-type="string">
            <text:p text:style-name="P26">Shadow flicker emphasis</text:p>
          </table:table-cell>
          <table:table-cell table:style-name="Table1.A1" office:value-type="string">
            <text:p text:style-name="P26">Camera tracking shift toward the throne</text:p>
          </table:table-cell>
        </table:table-row>
        <table:table-row>
          <table:table-cell table:style-name="Table1.A1" office:value-type="string">
            <text:p text:style-name="P25">Blood Stains</text:p>
          </table:table-cell>
          <table:table-cell table:style-name="Table1.A1" office:value-type="string">
            <text:p text:style-name="P27"><text:span text:style-name="Source_20_Text"><text:span text:style-name="T2">[ -0.5, 0.01, 0 ]</text:span></text:span></text:p>
          </table:table-cell>
          <table:table-cell table:style-name="Table1.A1" office:value-type="string">
            <text:p text:style-name="P26">Darkened decal mesh</text:p>
          </table:table-cell>
          <table:table-cell table:style-name="Table1.A1" office:value-type="string">
            <text:p text:style-name="P26">Low-frequency drone audio cue</text:p>
          </table:table-cell>
        </table:table-row>
      </table:table>
      <text:list xml:id="list1284222605128158713" text:style-name="L4">
        <text:list-item>
          <text:p text:style-name="P18"><text:span text:style-name="T3">Exit Condition:</text:span><text:span text:style-name="T2"> Maintain a </text:span><text:span text:style-name="Source_20_Text"><text:span text:style-name="T2">hotspotsVisited</text:span></text:span><text:span text:style-name="T2"> counter array. When </text:span><text:span text:style-name="Source_20_Text"><text:span text:style-name="T2">hotspotsVisited.length === 4</text:span></text:span><text:span text:style-name="T2">, trigger a 2-second screen-space vignette fade, clear the hotspots, and transition state to </text:span><text:span text:style-name="Source_20_Text"><text:span text:style-name="T2">AppState.DEBATE_CUTSCENE</text:span></text:span><text:span text:style-name="T2">.</text:span></text:p>
        </text:list-item>
      </text:list>
      <text:h text:style-name="P29" text:outline-level="3">Scene ii: Debate (Narrative Cutscene)</text:h>
      <text:list xml:id="list729327938795211877" text:style-name="L5">
        <text:list-item>
          <text:p text:style-name="P4"><text:span text:style-name="T1">Goal:</text:span> Build ideological tension before the physical clash.</text:p>
        </text:list-item>
        <text:list-item>
          <text:p text:style-name="P11">Three.js Setup:</text:p>
          <text:list>
            <text:list-item>
              <text:p text:style-name="P4">Disable raycasters.</text:p>
            </text:list-item>
            <text:list-item>
              <text:p text:style-name="P19"><text:span text:style-name="T2">Execute pacing logic using </text:span><text:span text:style-name="Source_20_Text"><text:span text:style-name="T2">THREE.AnimationAction.crossFadeTo()</text:span></text:span><text:span text:style-name="T2"> to switch </text:span><text:span text:style-name="Source_20_Text"><text:span text:style-name="T2">HangTuah</text:span></text:span><text:span text:style-name="T2"> and </text:span><text:span text:style-name="Source_20_Text"><text:span text:style-name="T2">HangJebat</text:span></text:span><text:span text:style-name="T2"> from idle states into a pacing/circling animation loop centered around </text:span><text:span text:style-name="Source_20_Text"><text:span text:style-name="T2">[0, 0, 0]</text:span></text:span><text:span text:style-name="T2">.</text:span></text:p>
            </text:list-item>
          </text:list>
        </text:list-item>
        <text:list-item>
          <text:p text:style-name="P11"><text:soft-page-break/>Action Sequence:</text:p>
          <text:list>
            <text:list-item text:start-value="1">
              <text:p text:style-name="P19"><text:span text:style-name="T2">Play spatial dialogue files (</text:span><text:span text:style-name="Source_20_Text"><text:span text:style-name="T2">debate_tuah_1.mp3</text:span></text:span><text:span text:style-name="T2">, </text:span><text:span text:style-name="Source_20_Text"><text:span text:style-name="T2">debate_jebat_1.mp3</text:span></text:span><text:span text:style-name="T2">, etc.).</text:span></text:p>
            </text:list-item>
            <text:list-item>
              <text:p text:style-name="P19"><text:span text:style-name="T2">At the final line ("Conscience"), use GSAP to dim all ambient lights (</text:span><text:span text:style-name="Source_20_Text"><text:span text:style-name="T2">THREE.AmbientLight.intensity</text:span></text:span><text:span text:style-name="T2"> to </text:span><text:span text:style-name="Source_20_Text"><text:span text:style-name="T2">0.05</text:span></text:span><text:span text:style-name="T2">).</text:span></text:p>
            </text:list-item>
            <text:list-item>
              <text:p text:style-name="P19"><text:span text:style-name="T2">Target 2 specific torch </text:span><text:span text:style-name="Source_20_Text"><text:span text:style-name="T2">THREE.PointLight</text:span></text:span><text:span text:style-name="T2"> sources and drop their intensity to </text:span><text:span text:style-name="Source_20_Text"><text:span text:style-name="T2">0</text:span></text:span><text:span text:style-name="T2"> instantly.</text:span></text:p>
            </text:list-item>
            <text:list-item>
              <text:p text:style-name="P19"><text:span text:style-name="T2">Trigger a rhythmic </text:span><text:span text:style-name="Source_20_Text"><text:span text:style-name="T2">heartbeat_loop.mp3</text:span></text:span><text:span text:style-name="T2"> sound track. Transition to </text:span><text:span text:style-name="Source_20_Text"><text:span text:style-name="T2">AppState.THE_DUEL</text:span></text:span><text:span text:style-name="T2">.</text:span></text:p>
            </text:list-item>
          </text:list>
        </text:list-item>
      </text:list>
      <text:h text:style-name="P29" text:outline-level="3">Gameplay B: The Duel (Interactive Rhythm Stage)</text:h>
      <text:list xml:id="list3224785192756965384" text:style-name="L6">
        <text:list-item>
          <text:p text:style-name="P5"><text:span text:style-name="T1">Goal:</text:span> Amplify the weight of the conflict using the player as a theatrical director.</text:p>
        </text:list-item>
        <text:list-item>
          <text:p text:style-name="P12">Three.js Setup:</text:p>
          <text:list>
            <text:list-item>
              <text:p text:style-name="P5">Initialize combat animations on an explicit, time-stamped timeline hook.</text:p>
            </text:list-item>
            <text:list-item>
              <text:p text:style-name="P20"><text:span text:style-name="T2">Instantiate two </text:span><text:span text:style-name="Source_20_Text"><text:span text:style-name="T2">THREE.Mesh</text:span></text:span><text:span text:style-name="T2"> interactive drums in front of the player's boundary.</text:span></text:p>
            </text:list-item>
          </text:list>
        </text:list-item>
        <text:list-item>
          <text:p text:style-name="P12">Mechanics Checklist:</text:p>
          <text:list>
            <text:list-item>
              <text:p text:style-name="P20"><text:span text:style-name="T3">Strike Rhythm:</text:span><text:span text:style-name="T2"> Read collision/animation events from the duel timeline. When swords connect, render an unlit 2D ring mesh scaling down to a fixed radius. If the player triggers a controller intersect on the drum within the timing window, increase an </text:span><text:span text:style-name="Source_20_Text"><text:span text:style-name="T2">intensityClarity</text:span></text:span><text:span text:style-name="T2"> coefficient.</text:span></text:p>
            </text:list-item>
            <text:list-item>
              <text:p text:style-name="P20"><text:span text:style-name="T3">Dynamic Lighting:</text:span><text:span text:style-name="T2"> Allow controllers to intersect with unlit torch nodes. On click/squeeze, restore </text:span><text:span text:style-name="Source_20_Text"><text:span text:style-name="T2">PointLight</text:span></text:span><text:span text:style-name="T2"> intensity using a flickering </text:span><text:span text:style-name="Source_20_Text"><text:span text:style-name="T2">Math.random()</text:span></text:span><text:span text:style-name="T2"> loop inside the main </text:span><text:span text:style-name="Source_20_Text"><text:span text:style-name="T2">requestAnimationFrame</text:span></text:span><text:span text:style-name="T2">.</text:span></text:p>
            </text:list-item>
            <text:list-item>
              <text:p text:style-name="P20"><text:span text:style-name="T3">Gamelan Audio Layering:</text:span><text:span text:style-name="T2"> Tie the </text:span><text:span text:style-name="Source_20_Text"><text:span text:style-name="T2">intensityClarity</text:span></text:span><text:span text:style-name="T2"> variable to the volume parameters of a </text:span><text:span text:style-name="Source_20_Text"><text:span text:style-name="T2">THREE.Audio</text:span></text:span><text:span text:style-name="T2"> sub-layer (e.g., accelerating Gamelan percussion stems).</text:span></text:p>
            </text:list-item>
          </text:list>
        </text:list-item>
      </text:list>
      <text:h text:style-name="P29" text:outline-level="3">Scene iii: Outro (Narrative Conclusion)</text:h>
      <text:list xml:id="list1149671405175330992" text:style-name="L7">
        <text:list-item>
          <text:p text:style-name="P6"><text:span text:style-name="T1">Goal:</text:span> Resolution, isolation, and historical finality.</text:p>
        </text:list-item>
        <text:list-item>
          <text:p text:style-name="P13">Three.js Setup:</text:p>
          <text:list>
            <text:list-item>
              <text:p text:style-name="P6">Fade out all rhythm UI and drum meshes.</text:p>
            </text:list-item>
            <text:list-item>
              <text:p text:style-name="P21"><text:span text:style-name="T2">Play the final animations: </text:span><text:span text:style-name="Source_20_Text"><text:span text:style-name="T2">HangJebat</text:span></text:span><text:span text:style-name="T2"> transitions to a falling/collapse sequence; </text:span><text:span text:style-name="Source_20_Text"><text:span text:style-name="T2">HangTuah</text:span></text:span><text:span text:style-name="T2"> moves into a kneeling loop.</text:span></text:p>
            </text:list-item>
          </text:list>
        </text:list-item>
        <text:list-item>
          <text:p text:style-name="P13">Action Sequence:</text:p>
          <text:list>
            <text:list-item text:start-value="1">
              <text:p text:style-name="P21"><text:span text:style-name="T2">Play final spatial voice lines from the floor level </text:span><text:span text:style-name="Source_20_Text"><text:span text:style-name="T2">[0, 0.1, -1]</text:span></text:span><text:span text:style-name="T2">.</text:span></text:p>
            </text:list-item>
            <text:list-item>
              <text:p text:style-name="P21"><text:span text:style-name="T2">Fade out all background NPC meshes by modulating their materials to transparent and dropping opacity to </text:span><text:span text:style-name="Source_20_Text"><text:span text:style-name="T2">0</text:span></text:span><text:span text:style-name="T2">.</text:span></text:p>
            </text:list-item>
            <text:list-item>
              <text:p text:style-name="P21"><text:soft-page-break/><text:span text:style-name="T2">Introduce a slow translation animation for a </text:span><text:span text:style-name="Source_20_Text"><text:span text:style-name="T2">Servant</text:span></text:span><text:span text:style-name="T2"> mesh carrying out a floor cleaning loop.</text:span></text:p>
            </text:list-item>
            <text:list-item>
              <text:p text:style-name="P21"><text:span text:style-name="T2">Fade the </text:span><text:span text:style-name="Source_20_Text"><text:span text:style-name="T2">THREE.AmbientLight</text:span></text:span><text:span text:style-name="T2"> and remaining spot illumination down to total darkness over a linear 10-second window while playing the final voiceover script.</text:span></text:p>
            </text:list-item>
          </text:list>
        </text:list-item>
      </text:list>
      <text:h text:style-name="P30" text:outline-level="2">? Asset, Lighting, and Audio Pipeline</text:h>
      <text:h text:style-name="P29" text:outline-level="3">Visual Assets &amp; Layout</text:h>
      <text:list xml:id="list4269961036122411365" text:style-name="L8">
        <text:list-item>
          <text:p text:style-name="P7"><text:span text:style-name="T1">Scale:</text:span> $1\text{ unit} = 1\text{ meter}$. Ensure the palace hall is roughly $15\text{m} \times 25\text{m} \times 8\text{m}$ to feel imposing yet intimate in VR.</text:p>
        </text:list-item>
        <text:list-item>
          <text:p text:style-name="P22"><text:span text:style-name="T3">Environment:</text:span><text:span text:style-name="T2"> One low-draw-call, highly optimized GLTF/GLB file (</text:span><text:span text:style-name="Source_20_Text"><text:span text:style-name="T2">palace_balairong.glb</text:span></text:span><text:span text:style-name="T2">). Ensure all static wood grain textures and ambient shadows are completely baked into a single lightmap texture to maintain high mobile VR frame rates.</text:span></text:p>
        </text:list-item>
        <text:list-item>
          <text:p text:style-name="P22"><text:span text:style-name="T3">Characters:</text:span><text:span text:style-name="T2"> 4 distinct low-poly skeletal meshes (</text:span><text:span text:style-name="Source_20_Text"><text:span text:style-name="T2">Tuah</text:span></text:span><text:span text:style-name="T2">, </text:span><text:span text:style-name="Source_20_Text"><text:span text:style-name="T2">Jebat</text:span></text:span><text:span text:style-name="T2">, </text:span><text:span text:style-name="Source_20_Text"><text:span text:style-name="T2">Minister_A</text:span></text:span><text:span text:style-name="T2">, </text:span><text:span text:style-name="Source_20_Text"><text:span text:style-name="T2">Minister_B</text:span></text:span><text:span text:style-name="T2">) equipped with properly mapped standard bone structures for standard mixamo or custom-baked animations.</text:span></text:p>
        </text:list-item>
      </text:list>
      <text:h text:style-name="P29" text:outline-level="3">Lighting Framework</text:h>
      <text:p text:style-name="P1">JavaScript</text:p>
      <text:p text:style-name="P24"><text:span text:style-name="Source_20_Text"><text:span text:style-name="T2">// Setup core mood lighting inside initialization</text:span></text:span></text:p>
      <text:p text:style-name="P24"><text:span text:style-name="Source_20_Text"><text:span text:style-name="T2">const ambientLight = new THREE.AmbientLight(0x110d0a, 0.4); // Dark wood undertone</text:span></text:span></text:p>
      <text:p text:style-name="P24"><text:span text:style-name="Source_20_Text"><text:span text:style-name="T2">scene.add(ambientLight);</text:span></text:span></text:p>
      <text:p text:style-name="P24"/>
      <text:p text:style-name="P24"><text:span text:style-name="Source_20_Text"><text:span text:style-name="T2">// Ray-casting enabled torch light example</text:span></text:span></text:p>
      <text:p text:style-name="P24"><text:span text:style-name="Source_20_Text"><text:span text:style-name="T2">const torchLight = new THREE.PointLight(0xff6600, 1.5, 8);</text:span></text:span></text:p>
      <text:p text:style-name="P24"><text:span text:style-name="Source_20_Text"><text:span text:style-name="T2">torchLight.castShadow = true;</text:span></text:span></text:p>
      <text:p text:style-name="P24"><text:span text:style-name="Source_20_Text"><text:span text:style-name="T2">torchLight.shadow.mapSize.width = 512; // Mobile XR optimized shadow resolution</text:span></text:span></text:p>
      <text:p text:style-name="P24"><text:span text:style-name="Source_20_Text"><text:span text:style-name="T2">torchLight.shadow.mapSize.height = 512;</text:span></text:span></text:p>
      <text:h text:style-name="P29" text:outline-level="3">Audio Setup Hierarchy</text:h>
      <text:p text:style-name="P1">JavaScript</text:p>
      <text:p text:style-name="P24"><text:span text:style-name="Source_20_Text"><text:span text:style-name="T2">const audioListener = new THREE.AudioListener();</text:span></text:span></text:p>
      <text:p text:style-name="P24"><text:span text:style-name="Source_20_Text"><text:span text:style-name="T2">camera.add(audioListener); // Attach to XR Camera/HMD</text:span></text:span></text:p>
      <text:p text:style-name="P24"/>
      <text:p text:style-name="P24"><text:span text:style-name="Source_20_Text"><text:span text:style-name="T2">// Background Rain Environment</text:span></text:span></text:p>
      <text:p text:style-name="P24"><text:span text:style-name="Source_20_Text"><text:span text:style-name="T2">const rainAudio = new THREE.Audio(audioListener);</text:span></text:span></text:p>
      <text:p text:style-name="P24"><text:span text:style-name="Source_20_Text"><text:span text:style-name="T2">const audioLoader = new THREE.AudioLoader();</text:span></text:span></text:p>
      <text:p text:style-name="P24"><text:span text:style-name="Source_20_Text"><text:span text:style-name="T2">audioLoader.load('audio/rain_ambient.mp3', (buffer) =&gt; {</text:span></text:span></text:p>
      <text:p text:style-name="P24"><text:span text:style-name="Source_20_Text"><text:s text:c="2"/></text:span><text:span text:style-name="Source_20_Text"><text:span text:style-name="T2">rainAudio.setBuffer(buffer);</text:span></text:span></text:p>
      <text:p text:style-name="P24"><text:span text:style-name="Source_20_Text"><text:s text:c="2"/></text:span><text:span text:style-name="Source_20_Text"><text:span text:style-name="T2">rainAudio.setLoop(true);</text:span></text:span></text:p>
      <text:p text:style-name="P24"><text:span text:style-name="Source_20_Text"><text:s text:c="2"/></text:span><text:span text:style-name="Source_20_Text"><text:span text:style-name="T2">rainAudio.setVolume(0.3);</text:span></text:span></text:p>
      <text:p text:style-name="P24"><text:span text:style-name="Source_20_Text"><text:s text:c="2"/></text:span><text:span text:style-name="Source_20_Text"><text:span text:style-name="T2">rainAudio.play();</text:span></text:span></text:p>
      <text:p text:style-name="P24"><text:span text:style-name="Source_20_Text"><text:span text:style-name="T2">});</text:span></text:span></text:p>
      <text:p text:style-name="P24"/>
      <text:p text:style-name="P24"><text:span text:style-name="Source_20_Text"><text:span text:style-name="T2">// Spatial Dialogue Actor Node Hook</text:span></text:span></text:p>
      <text:p text:style-name="P24"><text:span text:style-name="Source_20_Text"><text:span text:style-name="T2">const actorAudio = new THREE.PositionalAudio(audioListener);</text:span></text:span></text:p>
      <text:p text:style-name="P24"><text:soft-page-break/><text:span text:style-name="Source_20_Text"><text:span text:style-name="T2">actorAudio.setRefDistance(1);</text:span></text:span></text:p>
      <text:p text:style-name="P24"><text:span text:style-name="Source_20_Text"><text:span text:style-name="T2">actorAudio.setMaxDistance(15);</text:span></text:span></text:p>
      <text:p text:style-name="P24"><text:span text:style-name="Source_20_Text"><text:span text:style-name="T2">// Attach actorAudio directly to the character's Head/Neck joint bone.</text:span></text:span></text:p>
      <text:h text:style-name="P30" text:outline-level="2">? Optimization Checklist for WebXR (Targeting 90 FPS)</text:h>
      <text:list xml:id="list4064954269734808568" text:style-name="L9">
        <text:list-item>
          <text:p text:style-name="P23"><text:span text:style-name="T3">Draw Calls:</text:span><text:span text:style-name="T2"> Keep draw calls under </text:span><text:span text:style-name="T3">80</text:span><text:span text:style-name="T2"> by merging identical background geometries (e.g., palace pillars and wall panels) using </text:span><text:span text:style-name="Source_20_Text"><text:span text:style-name="T2">THREE.BufferGeometryUtils.mergeGeometries()</text:span></text:span><text:span text:style-name="T2">.</text:span></text:p>
        </text:list-item>
        <text:list-item>
          <text:p text:style-name="P23"><text:span text:style-name="T3">Shaders:</text:span><text:span text:style-name="T2"> Restrict materials to </text:span><text:span text:style-name="Source_20_Text"><text:span text:style-name="T2">MeshStandardMaterial</text:span></text:span><text:span text:style-name="T2"> with baked maps. Avoid real-time glass or high-roughness refractive calculations.</text:span></text:p>
        </text:list-item>
        <text:list-item>
          <text:p text:style-name="P8"><text:span text:style-name="T1">Shadow Management:</text:span> Limit real-time shadow casting to a maximum of <text:span text:style-name="T1">2 dynamic lights</text:span> simultaneously (e.g., the primary flickering torches nearest to the duelists). All other lights must remain static.</text:p>
        </text:list-item>
        <text:list-item>
          <text:p text:style-name="P23"><text:span text:style-name="T3">Garbage Collection:</text:span><text:span text:style-name="T2"> Pre-allocate all </text:span><text:span text:style-name="Source_20_Text"><text:span text:style-name="T2">THREE.Vector3</text:span></text:span><text:span text:style-name="T2">, </text:span><text:span text:style-name="Source_20_Text"><text:span text:style-name="T2">THREE.Quaternion</text:span></text:span><text:span text:style-name="T2">, and </text:span><text:span text:style-name="Source_20_Text"><text:span text:style-name="T2">THREE.Matrix4</text:span></text:span><text:span text:style-name="T2"> instances globally outside the </text:span><text:span text:style-name="Source_20_Text"><text:span text:style-name="T2">renderer.setAnimationLoop</text:span></text:span><text:span text:style-name="T2"> frame function to minimize runtime stuttering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7-19T17:01:51</meta:creation-date>
    <meta:document-statistic meta:table-count="1" meta:image-count="0" meta:object-count="0" meta:page-count="5" meta:paragraph-count="130" meta:word-count="1080" meta:character-count="8005"/>
    <dc:date>2026-07-19T17:02:26.37</dc:date>
    <meta:editing-duration>PT37S</meta:editing-duration>
    <meta:editing-cycles>1</meta:editing-cycles>
    <meta:generator>OpenOffice/4.1.15$Win32 OpenOffice.org_project/4115m2$Build-9813</meta:generator>
  </office:meta>
</office:document-meta>
</file>